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8pt" officeooo:paragraph-rsid="000a0845" style:font-size-asian="8pt" style:font-size-complex="8pt"/>
    </style:style>
    <style:style style:name="P2" style:family="paragraph" style:parent-style-name="Preformatted_20_Text">
      <style:text-properties fo:font-size="8pt" style:font-size-asian="8pt" style:font-size-complex="8pt"/>
    </style:style>
    <style:style style:name="P3" style:family="paragraph" style:parent-style-name="Preformatted_20_Text" style:list-style-name="L1"/>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officeooo:rsid="000a08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ause identifiée : l'altitude au moment du transit <text:s text:c="155"/></text:p>
      <text:p text:style-name="Preformatted_20_Text"><text:s text:c="208"/></text:p>
      <text:p text:style-name="Preformatted_20_Text"><text:span text:style-name="T1">┌──────────────────────┬───────────┬─────────────────────┬────────────────────── <text:s text:c="101"/></text:span></text:p>
      <text:p text:style-name="P1">│ Altitude au méridien │ 1er delta │ <text:s text:c="3"/>Mode initial <text:s text:c="4"/>│ <text:s/>Comportement <text:s text:c="16"/>├──────────────────────┼───────────┼─────────────────────┼────────────────────── <text:s text:c="99"/></text:p>
      <text:p text:style-name="P2">│ &gt; 75° (zénith) <text:s text:c="6"/>│ 43–154° <text:s text:c="2"/>│ CONTINUOUS/CRITICAL │ Rapide — un seul gros saut <text:s text:c="118"/>├──────────────────────┼───────────┼─────────────────────┼────────────────────────────────────────── <text:s text:c="96"/></text:p>
      <text:p text:style-name="P2">│ 60–65° <text:s text:c="14"/>│ 2–5° <text:s text:c="5"/>│ NORMAL <text:s text:c="13"/>│ Lent puis rapide fragmenté en 2-3 chunks <text:s text:c="102"/>├──────────────────────┼───────────┼─────────────────────┼────────────────────────────────────────┤ <text:s text:c="102"/></text:p>
      <text:p text:style-name="P2">│ &lt; 60° <text:s text:c="15"/>│ 6–11° <text:s text:c="4"/>│ NORMAL <text:s text:c="13"/>│ Lent-rapide-lent — fragmenté en 3 chunks <text:s text:c="105"/></text:p>
      <text:p text:style-name="P2">└──────────────────────┴───────────┴─────────────────────┴────────────────────────────────────────── <text:s text:c="102"/></text:p>
      <text:p text:style-name="Preformatted_20_Text"><text:s text:c="208"/></text:p>
      <text:p text:style-name="Preformatted_20_Text">Pourquoi ? <text:s text:c="195"/></text:p>
      <text:p text:style-name="Preformatted_20_Text"><text:s text:c="208"/></text:p>
      <text:p text:style-name="Preformatted_20_Text">L'abaque (Loi_coupole.xlsx) mappe (azimut, altitude) → position_coupole. La discontinuité à az=180° dépend directement de l'altitude : <text:s text:c="71"/></text:p>
      <text:p text:style-name="Preformatted_20_Text"><text:s text:c="208"/></text:p>
      <text:list text:style-name="L1">
        <text:list-item>
          <text:p text:style-name="P3"><text:span text:style-name="T2">Altitude haute</text:span> (&gt;75°) : l'objet est proche du zénith, la coupole doit faire un demi-tour complet → le delta initial est énorme (43°–154°), ce qui déclenche immédiatement CONTINUOUS. Tout va vite, pas de problème. <text:s text:c="196"/></text:p>
        </text:list-item>
        <text:list-item>
          <text:p text:style-name="P3"><text:span text:style-name="T2">Altitude modérée</text:span> (&lt;65°) : l'objet est plus bas, le saut abaque est plus petit. Le 1er delta à az=180 n'est que de 2–11° → mode NORMAL (lent). Pendant que le moteur avance lentement, l'azimut astronomique continue d'évoluer, la cible abaque change, et un nouveau delta plus gros apparaît. D'où la fragmentation en chunks successifs avec des modes différents. <text:s text:c="52"/></text:p>
        </text:list-item>
      </text:list>
      <text:p text:style-name="Preformatted_20_Text"><text:s text:c="208"/></text:p>
      <text:p text:style-name="Preformatted_20_Text">C'est exactement le cas de M 90 cette nuit <text:s text:c="163"/></text:p>
      <text:p text:style-name="Preformatted_20_Text"><text:s text:c="207"/></text:p>
      <text:p text:style-name="Preformatted_20_Text">M 90 transitait à altitude 58.9° — bien en dessous du seuil. Le premier delta n'était que de -11°, insuffisant pour déclencher CRITICAL (seuil 30°). D'où le démarrage lent. <text:s text:c="33"/></text:p>
      <text:p text:style-name="Preformatted_20_Text"><text:s text:c="208"/></text:p>
      <text:p text:style-name="Preformatted_20_Text">Nuits précédentes cohérentes <text:s text:c="177"/></text:p>
      <text:p text:style-name="Preformatted_20_Text"><text:s text:c="208"/></text:p>
      <text:p text:style-name="Preformatted_20_Text"><text:span text:style-name="T2">NGC 3180 </text:span>(04-05/04) : altitude 87° au transit → delta -74° → CONTINUOUS d'emblée → aucun problème <text:s text:c="106"/></text:p>
      <text:p text:style-name="Preformatted_20_Text"><text:span text:style-name="T2">M 100 </text:span>(07/04) : altitude 61.5° → delta -4° → démarrage lent → même symptôme <text:s text:c="128"/></text:p>
      <text:p text:style-name="Preformatted_20_Text"><text:span text:style-name="T2">NGC 4568 </text:span>(08/04) : altitude 57° → delta -6° → même pattern 3 vitesses <text:s text:c="134"/></text:p>
      <text:p text:style-name="Preformatted_20_Text"/>
      <text:p text:style-name="Preformatted_20_Text">Conclusion <text:s text:c="195"/></text:p>
      <text:p text:style-name="Preformatted_20_Text"><text:s text:c="208"/></text:p>
      <text:p text:style-name="Preformatted_20_Text">Le comportement <text:span text:style-name="T3">est </text:span>lié à la déclinaison de l'objet (qui détermine l'altitude au transit). Les objets hauts dans le ciel passent bien, les objets à altitude modérée souffrent du problème des 3 vitesses.</text:p>
      <text:p text:style-name="Preformatted_20_Text"><text:s text:c="208"/></text:p>
      <text:p text:style-name="Preformatted_20_Text"><text:span text:style-name="T3">Avec la </text:span>correction (meridian_catchup_active) dès que le premier chunk &gt; 15° est détecté, on verrouille CONTINUOUS pour toute la suite. Cela couvre les objets à toutes les altitu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1T16:22:10.932374750</meta:creation-date>
    <dc:date>2026-04-11T16:29:35.554217534</dc:date>
    <meta:editing-duration>PT7M25S</meta:editing-duration>
    <meta:editing-cycles>1</meta:editing-cycles>
    <meta:document-statistic meta:table-count="0" meta:image-count="0" meta:object-count="0" meta:page-count="1" meta:paragraph-count="30" meta:word-count="332" meta:character-count="7001" meta:non-whitespace-character-count="2071"/>
    <meta:generator>LibreOffice/25.8.5.2$Linux_X86_64 LibreOffice_project/580$Build-2</meta:generator>
  </office:meta>
</office:document-meta>
</file>