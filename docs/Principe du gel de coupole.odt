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● Le problème <text:s text:c="194"/></text:p>
      <text:p text:style-name="Preformatted_20_Text"><text:s text:c="70"/></text:p>
      <text:p text:style-name="Preformatted_20_Text"><text:s text:c="2"/>D'après les logs, voici ce qui se passe cette nuit sur NGC 4559 : <text:s text:c="140"/></text:p>
      <text:p text:style-name="Preformatted_20_Text"><text:s text:c="3"/></text:p>
      <text:p text:style-name="Preformatted_20_Text"><text:s text:c="2"/>00:42 <text:s/>az=164° <text:s/>dome=221° <text:s text:c="2"/>← coupole côté Est, tout va bien <text:s text:c="145"/></text:p>
      <text:p text:style-name="Preformatted_20_Text"><text:s text:c="4"/>... corrections normales (~0.5°/min) ... <text:s text:c="163"/></text:p>
      <text:p text:style-name="Preformatted_20_Text"><text:s text:c="2"/>01:02 <text:s/>az=180° <text:s/>dome=177° <text:s text:c="2"/>← transit astronomique <text:s text:c="155"/></text:p>
      <text:p text:style-name="Preformatted_20_Text"><text:s text:c="2"/>01:03 <text:s/>az=180.4 dome=166° <text:s text:c="2"/>← SAUT ABAQUE : la coupole fonce vers l'Ouest <text:s text:c="132"/></text:p>
      <text:p text:style-name="Preformatted_20_Text"><text:s text:c="2"/>01:05 <text:s/>az=182° <text:s/>dome=122° <text:s text:c="2"/>← coupole arrivée côté Ouest <text:s text:c="149"/></text:p>
      <text:p text:style-name="Preformatted_20_Text"><text:s text:c="4"/>... mais la monture n'a pas encore flippé ... <text:s text:c="158"/></text:p>
      <text:p text:style-name="Preformatted_20_Text"><text:s text:c="2"/>01:15 <text:s/>(flip ASIAIR) <text:s text:c="7"/>← 12 minutes de trou dans les photos <text:s text:c="141"/></text:p>
      <text:p text:style-name="Preformatted_20_Text"><text:s text:c="208"/></text:p>
      <text:p text:style-name="Preformatted_20_Text"><text:s text:c="2"/>L'abaque dit "az &gt; 180° = objet côté Ouest = tube côté Ouest = coupole à 122°". Mais la monture est encore côté Est pendant 12 minutes. <text:s text:c="70"/></text:p>
      <text:p text:style-name="Preformatted_20_Text"><text:s text:c="208"/></text:p>
      <text:p text:style-name="Preformatted_20_Text"><text:s text:c="2"/>L'idée : geler l'azimut dans le calcul abaque <text:s text:c="160"/></text:p>
      <text:p text:style-name="Preformatted_20_Text"><text:s text:c="70"/></text:p>
      <text:p text:style-name="Preformatted_20_Text"><text:s text:c="2"/>Quand on approche du méridien, on clamp l'azimut à 179.9° dans la lookup abaque. La coupole continue ses micro-corrections normales mais ne franchit jamais le seuil de 180° qui déclenche le saut de 57°. <text:s text:c="3"/></text:p>
      <text:p text:style-name="Preformatted_20_Text"><text:s text:c="70"/></text:p>
      <text:p text:style-name="Preformatted_20_Text"><text:s text:c="2"/>Phase 1 — AVANT le transit (az &lt; 180°) : <text:s text:c="165"/></text:p>
      <text:p text:style-name="Preformatted_20_Text"><text:s text:c="4"/>→ Comportement normal, rien ne change <text:s text:c="166"/></text:p>
      <text:p text:style-name="Preformatted_20_Text"><text:s text:c="3"/></text:p>
      <text:p text:style-name="Preformatted_20_Text"><text:s text:c="2"/>Phase 2 — GEL (az ≥ 180°, délai GEM pas écoulé) : <text:s text:c="156"/></text:p>
      <text:p text:style-name="Preformatted_20_Text"><text:s text:c="4"/>→ On force az = 179.9° dans l'abaque <text:s text:c="29"/></text:p>
      <text:p text:style-name="Preformatted_20_Text"><text:s text:c="4"/>→ La coupole reste en position pré-flip (~177°) <text:s text:c="156"/></text:p>
      <text:p text:style-name="Preformatted_20_Text"><text:s text:c="4"/>→ Les photos continuent normalement <text:s text:c="168"/></text:p>
      <text:p text:style-name="Preformatted_20_Text"><text:s text:c="4"/>→ Durée : gem_delay_minutes (configurable, ex: 15 min) <text:s text:c="149"/></text:p>
      <text:p text:style-name="Preformatted_20_Text"><text:s text:c="208"/></text:p>
      <text:p text:style-name="Preformatted_20_Text"><text:s text:c="2"/>Phase 3 — LIBÉRATION (délai GEM écoulé) : <text:s text:c="164"/></text:p>
      <text:p text:style-name="Preformatted_20_Text"><text:s text:c="4"/>→ On laisse passer l'azimut réel (ex: 185°) <text:s text:c="160"/></text:p>
      <text:p text:style-name="Preformatted_20_Text"><text:s text:c="4"/>→ L'abaque donne dome=124° → correction de ~53° <text:s text:c="156"/></text:p>
      <text:p text:style-name="Preformatted_20_Text"><text:s text:c="4"/>→ La coupole fait son GOTO en ~2 min <text:s text:c="167"/></text:p>
      <text:p text:style-name="Preformatted_20_Text"><text:s text:c="4"/>→ Le flip monture a déjà eu lieu → alignement immédiat <text:s text:c="149"/></text:p>
      <text:p text:style-name="Preformatted_20_Text"><text:s text:c="208"/></text:p>
      <text:p text:style-name="Preformatted_20_Text"><text:s text:c="2"/>Ce que ça change concrètement <text:s text:c="176"/></text:p>
      <text:p text:style-name="Preformatted_20_Text"><text:s text:c="208"/></text:p>
      <text:p text:style-name="Preformatted_20_Text"><text:s text:c="2"/>┌───────────────────────┬─────────────────────────────────────────┐ <text:s text:c="138"/></text:p>
      <text:p text:style-name="Preformatted_20_Text"><text:s text:c="2"/>│ <text:s text:c="3"/>Avant (actuel) <text:s text:c="4"/>│ <text:s text:c="11"/>Après (avec gel) <text:s text:c="12"/>│</text:p>
      <text:p text:style-name="Preformatted_20_Text"><text:s text:c="2"/>├───────────────────────┼─────────────────────────────────────────┤ <text:s text:c="138"/></text:p>
      <text:p text:style-name="Preformatted_20_Text"><text:s text:c="2"/>│ Coupole bouge à 01:03 │ Coupole bouge à 01:17 (après gem_delay) │ </text:p>
      <text:p text:style-name="Preformatted_20_Text"><text:s text:c="2"/>├───────────────────────┼─────────────────────────────────────────┤</text:p>
      <text:p text:style-name="Preformatted_20_Text"><text:s text:c="2"/>│ Monture flip à 01:15 <text:s/>│ Monture flip à 01:15 <text:s text:c="19"/>│ <text:s text:c="138"/></text:p>
      <text:p text:style-name="Preformatted_20_Text"><text:s text:c="2"/>├───────────────────────┼─────────────────────────────────────────┤ <text:s text:c="138"/></text:p>
      <text:p text:style-name="Preformatted_20_Text"><text:s text:c="2"/>│ 12 min de trou <text:s text:c="7"/>│ ~2 min (juste le GOTO) <text:s text:c="17"/>│ <text:s text:c="138"/></text:p>
      <text:p text:style-name="Preformatted_20_Text"><text:s text:c="2"/>└───────────────────────┴─────────────────────────────────────────┘ <text:s text:c="138"/></text:p>
      <text:p text:style-name="Preformatted_20_Text"><text:s text:c="70"/></text:p>
      <text:p text:style-name="Preformatted_20_Text"><text:s text:c="2"/>Paramètre <text:s text:c="196"/></text:p>
      <text:p text:style-name="Preformatted_20_Text"><text:s text:c="70"/></text:p>
      <text:p text:style-name="Preformatted_20_Text"><text:s text:c="2"/>Le gem_delay_minutes dans config.json (qu'on a déjà ajouté) servirait maintenant à quelque chose de réel : c'est la durée de gel après le transit astronomique. Réglé à 15 min = worst case ASIAIR, la coupole</text:p>
      <text:p text:style-name="Preformatted_20_Text"><text:s text:c="3"/>attend toujours assez longtemp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8:47.307558615</meta:creation-date>
    <dc:date>2026-04-10T20:40:04.109631803</dc:date>
    <meta:editing-duration>PT1M17S</meta:editing-duration>
    <meta:editing-cycles>1</meta:editing-cycles>
    <meta:document-statistic meta:table-count="0" meta:image-count="0" meta:object-count="0" meta:page-count="1" meta:paragraph-count="49" meta:word-count="339" meta:character-count="8365" meta:non-whitespace-character-count="1844"/>
    <meta:generator>LibreOffice/25.8.5.2$Linux_X86_64 LibreOffice_project/580$Build-2</meta:generator>
  </office:meta>
</office:document-meta>
</file>